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General dependencies</text:p>
      <text:p text:style-name="Standard">numpy&gt;=1.20.0</text:p>
      <text:p text:style-name="Standard">scipy&gt;=1.6.0</text:p>
      <text:p text:style-name="Standard">pandas&gt;=1.2.0</text:p>
      <text:p text:style-name="Standard">matplotlib&gt;=3.3.0</text:p>
      <text:p text:style-name="Standard">Pillow&gt;=8.0.0</text:p>
      <text:p text:style-name="Standard">seaborn&gt;=0.11.0</text:p>
      <text:p text:style-name="Standard"/>
      <text:p text:style-name="Standard"># Statistical analysis</text:p>
      <text:p text:style-name="Standard">scikit-learn&gt;=0.24.0</text:p>
      <text:p text:style-name="Standard">statsmodels&gt;=0.12.0</text:p>
      <text:p text:style-name="Standard">xgboost&gt;=1.3.0</text:p>
      <text:p text:style-name="Standard">adjustText&gt;=0.7.0</text:p>
      <text:p text:style-name="Standard"/>
      <text:p text:style-name="Standard"># GUI components</text:p>
      <text:p text:style-name="Standard">tkinter <text:s/># Usually comes with Python installation</text:p>
      <text:p text:style-name="Standard"/>
      <text:p text:style-name="Standard"># Report generation</text:p>
      <text:p text:style-name="Standard">reportlab&gt;=3.5.0</text:p>
      <text:p text:style-name="Standard"/>
      <text:p text:style-name="Standard"># Testing</text:p>
      <text:p text:style-name="Standard">pytest&gt;=6.0.0</text:p>
      <text:p text:style-name="Standard">pytest-cov&gt;=2.10.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56:56.572268700</meta:creation-date>
    <dc:date>2025-03-04T17:57:05.080234200</dc:date>
    <meta:editing-duration>PT9S</meta:editing-duration>
    <meta:editing-cycles>1</meta:editing-cycles>
    <meta:document-statistic meta:table-count="0" meta:image-count="0" meta:object-count="0" meta:page-count="1" meta:paragraph-count="19" meta:word-count="34" meta:character-count="337" meta:non-whitespace-character-count="321"/>
    <meta:generator>LibreOffice/25.2.0.3$Windows_X86_64 LibreOffice_project/e1cf4a87eb02d755bce1a01209907ea5ddc8f069</meta:generator>
  </office:meta>
</office:document-meta>
</file>